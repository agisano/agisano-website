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able:table table:name="Header" table:style-name="Tbl_Main">
        <table:table-column table:style-name="Col_Stretch"/>
        <table:table-column table:style-name="Col_Qty"/>
        <table:table-column table:style-name="Col_Unit"/>
        <table:table-column table:style-name="Col_Amt"/>
        <table:table-row table:style-name="R_Logo">
          <table:table-cell table:style-name="C_Dark">
            <text:p text:style-name="DarkBg"><text:span text:style-name="S_Wordmark">A  </text:span><text:span text:style-name="S_Wordmark">Agisano</text:span></text:p>
          </table:table-cell>
          <table:table-cell table:style-name="C_DarkR" table:number-columns-spanned="3">
            <text:p text:style-name="DarkBg"><text:span text:style-name="S_MetaLabel">INVOICE</text:span></text:p>
            <text:p text:style-name="DarkBg"><text:span text:style-name="S_InvNum">{ref}</text:span></text:p>
          </table:table-cell>
          <table:covered-table-cell/>
          <table:covered-table-cell/>
        </table:table-row>
        <table:table-row table:style-name="R_Div1">
          <table:table-cell table:style-name="C_DarkDiv" table:number-columns-spanned="4">
            <text:p text:style-name="DarkBg"/>
          </table:table-cell>
          <table:covered-table-cell/>
          <table:covered-table-cell/>
          <table:covered-table-cell/>
        </table:table-row>
        <table:table-row table:style-name="R_Meta">
          <table:table-cell table:style-name="C_Dark">
            <text:p text:style-name="DarkBg"><text:span text:style-name="S_MetaLabel">FROM</text:span></text:p>
            <text:p text:style-name="DarkBg"><text:span text:style-name="S_MetaStrong">Agisano (Pty) Ltd</text:span></text:p>
            <text:p text:style-name="DarkBg"><text:span text:style-name="S_MetaVal">hello@agisano.com</text:span></text:p>
            <text:p text:style-name="DarkBg"><text:span text:style-name="S_MetaVal">agisano.com</text:span></text:p>
            <text:p text:style-name="DarkBg"><text:span text:style-name="S_MetaVal">Gauteng, South Africa</text:span></text:p>
          </table:table-cell>
          <table:table-cell table:style-name="C_Dark" table:number-columns-spanned="2">
            <text:p text:style-name="DarkBg"><text:span text:style-name="S_MetaLabel">ISSUE DATE</text:span></text:p>
            <text:p text:style-name="DarkBg"><text:span text:style-name="S_MetaStrong">{date}</text:span></text:p>
            <text:p text:style-name="DarkBg"/>
            <text:p text:style-name="DarkBg"><text:span text:style-name="S_MetaLabel">DUE DATE</text:span></text:p>
            <text:p text:style-name="DarkBg"><text:span text:style-name="S_OrangeVal">{date_lim}</text:span></text:p>
          </table:table-cell>
          <table:covered-table-cell/>
          <table:table-cell table:style-name="C_DarkR">
            <text:p text:style-name="DarkBg"><text:span text:style-name="S_MetaLabel">VAT / REG</text:span></text:p>
            <text:p text:style-name="DarkBg"><text:span text:style-name="S_MetaStrong">VAT: {your_vat_no}</text:span></text:p>
            <text:p text:style-name="DarkBg"><text:span text:style-name="S_MetaVal">Reg: {your_reg_no}</text:span></text:p>
          </table:table-cell>
        </table:table-row>
      </table:table>
      <table:table table:name="BillTo" table:style-name="Tbl_Main">
        <table:table-column table:style-name="Col_Stretch"/>
        <table:table-column table:style-name="Col_Qty"/>
        <table:table-column table:style-name="Col_Unit"/>
        <table:table-column table:style-name="Col_Amt"/>
        <table:table-row table:style-name="R_BillTo">
          <table:table-cell table:style-name="C_Cream" table:number-columns-spanned="3">
            <text:p text:style-name="CreamBg"><text:span text:style-name="S_BillLabel">BILLED TO</text:span></text:p>
            <text:p text:style-name="CreamBg"><text:span text:style-name="S_BillName">{customer_name}</text:span></text:p>
            <text:p text:style-name="CreamBg"><text:span text:style-name="S_BillDetail">Attn: {customer_firstname} {customer_lastname}</text:span></text:p>
            <text:p text:style-name="CreamBg"><text:span text:style-name="S_BillDetail">{customer_address}</text:span></text:p>
          </table:table-cell>
          <table:covered-table-cell/>
          <table:covered-table-cell/>
          <table:table-cell table:style-name="C_CreamR">
            <text:p text:style-name="CreamBg"><text:span text:style-name="S_StatusPill">{status}</text:span></text:p>
          </table:table-cell>
        </table:table-row>
      </table:table>
      <table:table table:name="LineItems" table:style-name="Tbl_Main">
        <table:table-column table:style-name="Col_Stretch"/>
        <table:table-column table:style-name="Col_Qty"/>
        <table:table-column table:style-name="Col_Unit"/>
        <table:table-column table:style-name="Col_Amt"/>
        <table:table-row table:style-name="R_TH">
          <table:table-cell table:style-name="C_TH">
            <text:p text:style-name="WhiteBg"><text:span text:style-name="S_TH">DESCRIPTION</text:span></text:p>
          </table:table-cell>
          <table:table-cell table:style-name="C_TH">
            <text:p text:style-name="WhiteBg"><text:span text:style-name="S_TH">QTY</text:span></text:p>
          </table:table-cell>
          <table:table-cell table:style-name="C_TH">
            <text:p text:style-name="WhiteBg"><text:span text:style-name="S_TH">UNIT PRICE</text:span></text:p>
          </table:table-cell>
          <table:table-cell table:style-name="C_THR">
            <text:p text:style-name="WhiteBg"><text:span text:style-name="S_TH">AMOUNT</text:span></text:p>
          </table:table-cell>
        </table:table-row>
        <table:table-row table:style-name="R_Line0">
          <table:table-cell table:style-name="C_WL0">
            <text:p text:style-name="WhiteBg"><text:span text:style-name="S_ItemName">{forlines}{desc}</text:span></text:p>
            <text:p text:style-name="WhiteBg"><text:span text:style-name="S_ItemDesc">{label_optional}</text:span></text:p>
          </table:table-cell>
          <table:table-cell table:style-name="C_WL0">
            <text:p text:style-name="WhiteBg"><text:span text:style-name="S_Cell">{qty}</text:span></text:p>
          </table:table-cell>
          <table:table-cell table:style-name="C_WL0">
            <text:p text:style-name="WhiteBg"><text:span text:style-name="S_Cell">{up}</text:span></text:p>
          </table:table-cell>
          <table:table-cell table:style-name="C_WLR0">
            <text:p text:style-name="WhiteBg"><text:span text:style-name="S_CellAmt">{total_ht}{/forlines}</text:span></text:p>
          </table:table-cell>
        </table:table-row>
        <table:table-row table:style-name="R_Line1">
          <table:table-cell table:style-name="C_WL1">
            <text:p text:style-name="WhiteBg"/>
          </table:table-cell>
          <table:table-cell table:style-name="C_WL1">
            <text:p text:style-name="WhiteBg"/>
          </table:table-cell>
          <table:table-cell table:style-name="C_WL1">
            <text:p text:style-name="WhiteBg"/>
          </table:table-cell>
          <table:table-cell table:style-name="C_WLR1">
            <text:p text:style-name="WhiteBg"/>
          </table:table-cell>
        </table:table-row>
        <table:table-row table:style-name="R_Line2">
          <table:table-cell table:style-name="C_WL2">
            <text:p text:style-name="WhiteBg"/>
          </table:table-cell>
          <table:table-cell table:style-name="C_WL2">
            <text:p text:style-name="WhiteBg"/>
          </table:table-cell>
          <table:table-cell table:style-name="C_WL2">
            <text:p text:style-name="WhiteBg"/>
          </table:table-cell>
          <table:table-cell table:style-name="C_WLR2">
            <text:p text:style-name="WhiteBg"/>
          </table:table-cell>
        </table:table-row>
        <table:table-row table:style-name="R_Line3">
          <table:table-cell table:style-name="C_WL3">
            <text:p text:style-name="WhiteBg"/>
          </table:table-cell>
          <table:table-cell table:style-name="C_WL3">
            <text:p text:style-name="WhiteBg"/>
          </table:table-cell>
          <table:table-cell table:style-name="C_WL3">
            <text:p text:style-name="WhiteBg"/>
          </table:table-cell>
          <table:table-cell table:style-name="C_WLR3">
            <text:p text:style-name="WhiteBg"/>
          </table:table-cell>
        </table:table-row>
      </table:table>
      <table:table table:name="Totals" table:style-name="Tbl_Main">
        <table:table-column table:style-name="Col_TotLabel"/>
        <table:table-column table:style-name="Col_TotVal"/>
        <table:table-row table:style-name="R_Tot_Subtot">
          <table:table-cell table:style-name="C_TotalCell">
            <text:p text:style-name="WhiteBg"><text:span text:style-name="S_TotalLabel">Subtotal (excl. VAT)</text:span></text:p>
          </table:table-cell>
          <table:table-cell table:style-name="C_TotalCell">
            <text:p text:style-name="WhiteBg"><text:span text:style-name="S_TotalVal">{total_ht}</text:span></text:p>
          </table:table-cell>
        </table:table-row>
        <table:table-row table:style-name="R_Tot_VAT (1">
          <table:table-cell table:style-name="C_TotalCell">
            <text:p text:style-name="WhiteBg"><text:span text:style-name="S_TotalLabel">VAT (15%)</text:span></text:p>
          </table:table-cell>
          <table:table-cell table:style-name="C_TotalCell">
            <text:p text:style-name="WhiteBg"><text:span text:style-name="S_TotalVal">{total_vat}</text:span></text:p>
          </table:table-cell>
        </table:table-row>
        <table:table-row table:style-name="R_Tot_Total ">
          <table:table-cell table:style-name="C_GrandCell">
            <text:p text:style-name="WhiteBg"><text:span text:style-name="S_GrandLabel">Total due (incl. VAT)</text:span></text:p>
          </table:table-cell>
          <table:table-cell table:style-name="C_GrandCell">
            <text:p text:style-name="WhiteBg"><text:span text:style-name="S_GrandVal">{total_ttc}</text:span></text:p>
          </table:table-cell>
        </table:table-row>
      </table:table>
      <table:table table:name="Notes" table:style-name="Tbl_Main">
        <table:table-column table:style-name="Col_Half"/>
        <table:table-column table:style-name="Col_Half"/>
        <table:table-row table:style-name="R_Notes">
          <table:table-cell table:style-name="C_Cream2">
            <text:p text:style-name="Cream2Bg"><text:span text:style-name="S_NoteLabel">BANKING DETAILS</text:span></text:p>
            <text:p text:style-name="Cream2Bg"><text:span text:style-name="S_NoteStrong">Agisano (Pty) Ltd</text:span></text:p>
            <text:p text:style-name="Cream2Bg"><text:span text:style-name="S_NoteVal">Bank: {your_bank}</text:span></text:p>
            <text:p text:style-name="Cream2Bg"><text:span text:style-name="S_NoteVal">Account: {your_account_no}</text:span></text:p>
            <text:p text:style-name="Cream2Bg"><text:span text:style-name="S_NoteVal">Branch code: {your_branch_code}</text:span></text:p>
            <text:p text:style-name="Cream2Bg"><text:span text:style-name="S_NoteStrong">Reference: {ref}</text:span></text:p>
          </table:table-cell>
          <table:table-cell table:style-name="C_Cream2R">
            <text:p text:style-name="Cream2Bg"><text:span text:style-name="S_NoteLabel">PAYMENT TERMS &amp; NOTES</text:span></text:p>
            <text:p text:style-name="Cream2Bg"><text:span text:style-name="S_NoteVal">Payment due within 14 days of invoice date.</text:span></text:p>
            <text:p text:style-name="Cream2Bg"><text:span text:style-name="S_NoteVal">Use invoice number as payment reference.</text:span></text:p>
            <text:p text:style-name="Cream2Bg"/>
            <text:p text:style-name="Cream2Bg"><text:span text:style-name="S_NoteVal">Queries: hello@agisano.com</text:span></text:p>
            <text:p text:style-name="Cream2Bg"><text:span text:style-name="S_NoteVal">{notes}</text:span></text:p>
          </table:table-cell>
        </table:table-row>
      </table:table>
      <table:table table:name="Footer" table:style-name="Tbl_Main">
        <table:table-column table:style-name="Col_Stretch"/>
        <table:table-column table:style-name="Col_Qty"/>
        <table:table-column table:style-name="Col_Unit"/>
        <table:table-column table:style-name="Col_Amt"/>
        <table:table-row table:style-name="R_Footer">
          <table:table-cell table:style-name="C_Footer" table:number-columns-spanned="3">
            <text:p text:style-name="FooterBg"><text:span text:style-name="S_FooterTxt">Agisano (Pty) Ltd  ·  Reg: {your_reg_no}  ·  VAT: {your_vat_no}  ·  Gauteng, South Africa</text:span></text:p>
          </table:table-cell>
          <table:covered-table-cell/>
          <table:covered-table-cell/>
          <table:table-cell table:style-name="C_FooterR">
            <text:p text:style-name="FooterBg"><text:span text:style-name="S_FooterRight">agisano.com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DarkBg" style:family="paragraph" style:display-name="DarkBg">
      <style:paragraph-properties fo:text-align="left" fo:background-color="#07090C"/>
      <style:text-properties style:font-name="Inter" fo:font-size="10pt" fo:color="#07090C" fo:background-color="#07090C"/>
    </style:style>
    <style:style style:name="CreamBg" style:family="paragraph" style:display-name="CreamBg">
      <style:paragraph-properties fo:text-align="left" fo:background-color="#F2EDE6"/>
      <style:text-properties style:font-name="Inter" fo:font-size="10pt" fo:color="#07090C" fo:background-color="#F2EDE6"/>
    </style:style>
    <style:style style:name="FooterBg" style:family="paragraph" style:display-name="FooterBg">
      <style:paragraph-properties fo:text-align="left" fo:background-color="#040609"/>
      <style:text-properties style:font-name="Inter" fo:font-size="10pt" fo:color="#07090C" fo:background-color="#040609"/>
    </style:style>
    <style:style style:name="WhiteBg" style:family="paragraph" style:display-name="WhiteBg">
      <style:paragraph-properties fo:text-align="left" fo:background-color="#FFFFFF"/>
      <style:text-properties style:font-name="Inter" fo:font-size="10pt" fo:color="#07090C" fo:background-color="#FFFFFF"/>
    </style:style>
    <style:style style:name="Cream2Bg" style:family="paragraph" style:display-name="Cream2Bg">
      <style:paragraph-properties fo:text-align="left" fo:background-color="#EDE7DF"/>
      <style:text-properties style:font-name="Inter" fo:font-size="10pt" fo:color="#07090C" fo:background-color="#EDE7DF"/>
    </style:style>
    <style:style style:name="S_InvLabel" style:family="text" style:display-name="S_InvLabel">
      <style:text-properties style:font-name="Sora" fo:font-size="7pt" fo:color="rgba(242,237,230,0.3)" fo:font-weight="bold"/>
    </style:style>
    <style:style style:name="S_InvNum" style:family="text" style:display-name="S_InvNum">
      <style:text-properties style:font-name="Sora" fo:font-size="22pt" fo:color="#F2EDE6" fo:font-weight="bold"/>
    </style:style>
    <style:style style:name="S_Wordmark" style:family="text" style:display-name="S_Wordmark">
      <style:text-properties style:font-name="Sora" fo:font-size="14pt" fo:color="#F2EDE6" fo:font-weight="bold"/>
    </style:style>
    <style:style style:name="S_MetaLabel" style:family="text" style:display-name="S_MetaLabel">
      <style:text-properties style:font-name="Sora" fo:font-size="7pt" fo:color="#666055" fo:font-weight="bold"/>
    </style:style>
    <style:style style:name="S_MetaVal" style:family="text" style:display-name="S_MetaVal">
      <style:text-properties style:font-name="Inter" fo:font-size="10pt" fo:color="#A09888"/>
    </style:style>
    <style:style style:name="S_MetaStrong" style:family="text" style:display-name="S_MetaStrong">
      <style:text-properties style:font-name="Inter" fo:font-size="10pt" fo:color="#F2EDE6" fo:font-weight="bold"/>
    </style:style>
    <style:style style:name="S_OrangeVal" style:family="text" style:display-name="S_OrangeVal">
      <style:text-properties style:font-name="Inter" fo:font-size="10pt" fo:color="#E85D1B" fo:font-weight="bold"/>
    </style:style>
    <style:style style:name="S_BillName" style:family="text" style:display-name="S_BillName">
      <style:text-properties style:font-name="Sora" fo:font-size="13pt" fo:color="#07090C" fo:font-weight="bold"/>
    </style:style>
    <style:style style:name="S_BillLabel" style:family="text" style:display-name="S_BillLabel">
      <style:text-properties style:font-name="Sora" fo:font-size="7pt" fo:color="#999088" fo:font-weight="bold"/>
    </style:style>
    <style:style style:name="S_BillDetail" style:family="text" style:display-name="S_BillDetail">
      <style:text-properties style:font-name="Inter" fo:font-size="9pt" fo:color="#666055"/>
    </style:style>
    <style:style style:name="S_StatusPill" style:family="text" style:display-name="S_StatusPill">
      <style:text-properties style:font-name="Sora" fo:font-size="8pt" fo:color="#FFFFFF" fo:font-weight="bold" fo:background-color="#07090C"/>
    </style:style>
    <style:style style:name="S_TH" style:family="text" style:display-name="S_TH">
      <style:text-properties style:font-name="Sora" fo:font-size="7pt" fo:color="#888880" fo:font-weight="bold"/>
    </style:style>
    <style:style style:name="S_ItemName" style:family="text" style:display-name="S_ItemName">
      <style:text-properties style:font-name="Inter" fo:font-size="10pt" fo:color="#07090C" fo:font-weight="bold"/>
    </style:style>
    <style:style style:name="S_ItemDesc" style:family="text" style:display-name="S_ItemDesc">
      <style:text-properties style:font-name="Inter" fo:font-size="8.5pt" fo:color="#888880" fo:font-style="italic"/>
    </style:style>
    <style:style style:name="S_ItemNum" style:family="text" style:display-name="S_ItemNum">
      <style:text-properties style:font-name="Sora" fo:font-size="7pt" fo:color="#CCCCCC" fo:font-weight="bold"/>
    </style:style>
    <style:style style:name="S_Cell" style:family="text" style:display-name="S_Cell">
      <style:text-properties style:font-name="Inter" fo:font-size="10pt" fo:color="#555550"/>
    </style:style>
    <style:style style:name="S_CellAmt" style:family="text" style:display-name="S_CellAmt">
      <style:text-properties style:font-name="Inter" fo:font-size="10pt" fo:color="#07090C" fo:font-weight="bold"/>
    </style:style>
    <style:style style:name="S_TotalLabel" style:family="text" style:display-name="S_TotalLabel">
      <style:text-properties style:font-name="Inter" fo:font-size="10pt" fo:color="#888880"/>
    </style:style>
    <style:style style:name="S_TotalVal" style:family="text" style:display-name="S_TotalVal">
      <style:text-properties style:font-name="Inter" fo:font-size="10pt" fo:color="#07090C" fo:font-weight="bold"/>
    </style:style>
    <style:style style:name="S_GrandLabel" style:family="text" style:display-name="S_GrandLabel">
      <style:text-properties style:font-name="Sora" fo:font-size="12pt" fo:color="#07090C" fo:font-weight="bold"/>
    </style:style>
    <style:style style:name="S_GrandVal" style:family="text" style:display-name="S_GrandVal">
      <style:text-properties style:font-name="Sora" fo:font-size="17pt" fo:color="#E85D1B" fo:font-weight="bold"/>
    </style:style>
    <style:style style:name="S_NoteLabel" style:family="text" style:display-name="S_NoteLabel">
      <style:text-properties style:font-name="Sora" fo:font-size="7pt" fo:color="#555044" fo:font-weight="bold"/>
    </style:style>
    <style:style style:name="S_NoteVal" style:family="text" style:display-name="S_NoteVal">
      <style:text-properties style:font-name="Inter" fo:font-size="9pt" fo:color="#9A9488"/>
    </style:style>
    <style:style style:name="S_NoteStrong" style:family="text" style:display-name="S_NoteStrong">
      <style:text-properties style:font-name="Inter" fo:font-size="9pt" fo:color="#C8C2BB" fo:font-weight="bold"/>
    </style:style>
    <style:style style:name="S_FooterTxt" style:family="text" style:display-name="S_FooterTxt">
      <style:text-properties style:font-name="Inter" fo:font-size="8pt" fo:color="#444040"/>
    </style:style>
    <style:style style:name="S_FooterRight" style:family="text" style:display-name="S_FooterRight">
      <style:text-properties style:font-name="Sora" fo:font-size="7pt" fo:color="#333030" fo:font-weight="bold"/>
    </style:style>
    <style:style style:name="C_Dark" style:family="table-cell" style:display-name="C_Dark">
      <style:table-cell-properties fo:background-color="#07090C" style:vertical-align="top" fo:padding-top="0.3cm" fo:padding-bottom="0.3cm" fo:padding-left="0.5cm" fo:padding-right="0.3cm"/>
    </style:style>
    <style:style style:name="C_DarkR" style:family="table-cell" style:display-name="C_DarkR">
      <style:table-cell-properties fo:background-color="#07090C" style:vertical-align="top" fo:padding-top="0.3cm" fo:padding-bottom="0.3cm" fo:padding-left="0.3cm" fo:padding-right="0.5cm"/>
    </style:style>
    <style:style style:name="C_Cream" style:family="table-cell" style:display-name="C_Cream">
      <style:table-cell-properties fo:background-color="#F2EDE6" style:vertical-align="top" fo:padding-top="0.25cm" fo:padding-bottom="0.25cm" fo:padding-left="0.5cm" fo:padding-right="0.3cm"/>
    </style:style>
    <style:style style:name="C_CreamR" style:family="table-cell" style:display-name="C_CreamR">
      <style:table-cell-properties fo:background-color="#F2EDE6" style:vertical-align="top" fo:padding-top="0.25cm" fo:padding-bottom="0.25cm" fo:padding-left="0.3cm" fo:padding-right="0.5cm"/>
    </style:style>
    <style:style style:name="C_White" style:family="table-cell" style:display-name="C_White">
      <style:table-cell-properties fo:background-color="#FFFFFF" style:vertical-align="top" fo:padding-top="0.22cm" fo:padding-bottom="0.22cm" fo:padding-left="0.5cm" fo:padding-right="0.3cm" fo:border-bottom="0.03cm solid #EBEBEB"/>
    </style:style>
    <style:style style:name="C_WhiteR" style:family="table-cell" style:display-name="C_WhiteR">
      <style:table-cell-properties fo:background-color="#FFFFFF" style:vertical-align="top" fo:padding-top="0.22cm" fo:padding-bottom="0.22cm" fo:padding-left="0.3cm" fo:padding-right="0.5cm" fo:border-bottom="0.03cm solid #EBEBEB"/>
    </style:style>
    <style:style style:name="C_TH" style:family="table-cell" style:display-name="C_TH">
      <style:table-cell-properties fo:background-color="#FFFFFF" style:vertical-align="top" fo:padding-top="0.18cm" fo:padding-bottom="0.14cm" fo:padding-left="0.5cm" fo:padding-right="0.3cm" fo:border-bottom="0.05cm solid #07090C"/>
    </style:style>
    <style:style style:name="C_THR" style:family="table-cell" style:display-name="C_THR">
      <style:table-cell-properties fo:background-color="#FFFFFF" style:vertical-align="top" fo:padding-top="0.18cm" fo:padding-bottom="0.14cm" fo:padding-left="0.3cm" fo:padding-right="0.5cm" fo:border-bottom="0.05cm solid #07090C"/>
    </style:style>
    <style:style style:name="C_TotalCell" style:family="table-cell" style:display-name="C_TotalCell">
      <style:table-cell-properties fo:background-color="#FFFFFF" style:vertical-align="top" fo:padding-top="0.1cm" fo:padding-bottom="0.1cm" fo:padding-left="0.3cm" fo:padding-right="0.5cm"/>
    </style:style>
    <style:style style:name="C_GrandCell" style:family="table-cell" style:display-name="C_GrandCell">
      <style:table-cell-properties fo:background-color="#FFFFFF" style:vertical-align="top" fo:padding-top="0.18cm" fo:padding-bottom="0.18cm" fo:padding-left="0.3cm" fo:padding-right="0.5cm" fo:border-top="0.03cm solid #DDDDDD"/>
    </style:style>
    <style:style style:name="C_Cream2" style:family="table-cell" style:display-name="C_Cream2">
      <style:table-cell-properties fo:background-color="#EDE7DF" style:vertical-align="top" fo:padding-top="0.3cm" fo:padding-bottom="0.3cm" fo:padding-left="0.5cm" fo:padding-right="0.3cm"/>
    </style:style>
    <style:style style:name="C_Cream2R" style:family="table-cell" style:display-name="C_Cream2R">
      <style:table-cell-properties fo:background-color="#EDE7DF" style:vertical-align="top" fo:padding-top="0.3cm" fo:padding-bottom="0.3cm" fo:padding-left="0.3cm" fo:padding-right="0.5cm"/>
    </style:style>
    <style:style style:name="C_Footer" style:family="table-cell" style:display-name="C_Footer">
      <style:table-cell-properties fo:background-color="#040609" style:vertical-align="top" fo:padding-top="0.2cm" fo:padding-bottom="0.2cm" fo:padding-left="0.5cm" fo:padding-right="0.3cm"/>
    </style:style>
    <style:style style:name="C_FooterR" style:family="table-cell" style:display-name="C_FooterR">
      <style:table-cell-properties fo:background-color="#040609" style:vertical-align="top" fo:padding-top="0.2cm" fo:padding-bottom="0.2cm" fo:padding-left="0.3cm" fo:padding-right="0.5cm"/>
    </style:style>
    <style:style style:name="C_Spacer" style:family="table-cell" style:display-name="C_Spacer">
      <style:table-cell-properties fo:background-color="#FFFFFF" style:vertical-align="top" fo:padding-top="0cm" fo:padding-bottom="0cm" fo:padding-left="0cm" fo:padding-right="0cm"/>
    </style:style>
    <style:style style:name="Col_Stretch" style:family="table-column" style:display-name="Col_Stretch">
      <style:table-column-properties style:column-width="9.2cm"/>
    </style:style>
    <style:style style:name="Col_Qty" style:family="table-column" style:display-name="Col_Qty">
      <style:table-column-properties style:column-width="1.8cm"/>
    </style:style>
    <style:style style:name="Col_Unit" style:family="table-column" style:display-name="Col_Unit">
      <style:table-column-properties style:column-width="3.2cm"/>
    </style:style>
    <style:style style:name="Col_Amt" style:family="table-column" style:display-name="Col_Amt">
      <style:table-column-properties style:column-width="3.6cm"/>
    </style:style>
    <style:style style:name="Col_Half" style:family="table-column" style:display-name="Col_Half">
      <style:table-column-properties style:column-width="8.9cm"/>
    </style:style>
    <style:style style:name="Col_TotLabel" style:family="table-column" style:display-name="Col_TotLabel">
      <style:table-column-properties style:column-width="11.0cm"/>
    </style:style>
    <style:style style:name="Col_TotVal" style:family="table-column" style:display-name="Col_TotVal">
      <style:table-column-properties style:column-width="6.8cm"/>
    </style:style>
    <style:style style:name="Tbl_Main" style:family="table" style:display-name="Tbl_Main">
      <style:table-properties style:width="17.8cm" table:align="left"/>
    </style:style>
    <style:style style:name="R_Logo" style:family="table-row" style:display-name="R_Logo">
      <style:table-row-properties style:row-height="1.4cm" style:use-optimal-row-height="false"/>
    </style:style>
    <style:style style:name="C_DarkDiv" style:family="table-cell" style:display-name="C_DarkDiv">
      <style:table-cell-properties fo:background-color="#07090C" style:vertical-align="top" fo:padding-top="0cm" fo:padding-bottom="0cm" fo:padding-left="0cm" fo:padding-right="0cm" fo:border-bottom="0.02cm solid #222222"/>
    </style:style>
    <style:style style:name="R_Div1" style:family="table-row" style:display-name="R_Div1">
      <style:table-row-properties style:row-height="0.05cm" style:use-optimal-row-height="false"/>
    </style:style>
    <style:style style:name="R_Meta" style:family="table-row" style:display-name="R_Meta">
      <style:table-row-properties style:row-height="1.8cm" style:use-optimal-row-height="false"/>
    </style:style>
    <style:style style:name="R_BillTo" style:family="table-row" style:display-name="R_BillTo">
      <style:table-row-properties style:row-height="1.4cm" style:use-optimal-row-height="false"/>
    </style:style>
    <style:style style:name="R_TH" style:family="table-row" style:display-name="R_TH">
      <style:table-row-properties style:row-height="0.65cm" style:use-optimal-row-height="false"/>
    </style:style>
    <style:style style:name="C_WL0" style:family="table-cell" style:display-name="C_WL0">
      <style:table-cell-properties fo:background-color="#FFFFFF" style:vertical-align="top" fo:padding-top="0.18cm" fo:padding-bottom="0.18cm" fo:padding-left="0.5cm" fo:padding-right="0.3cm" fo:border-bottom="0.02cm solid #EFEFEF"/>
    </style:style>
    <style:style style:name="C_WLR0" style:family="table-cell" style:display-name="C_WLR0">
      <style:table-cell-properties fo:background-color="#FFFFFF" style:vertical-align="top" fo:padding-top="0.18cm" fo:padding-bottom="0.18cm" fo:padding-left="0.3cm" fo:padding-right="0.5cm" fo:border-bottom="0.02cm solid #EFEFEF"/>
    </style:style>
    <style:style style:name="R_Line0" style:family="table-row" style:display-name="R_Line0">
      <style:table-row-properties style:row-height="1.1cm" style:use-optimal-row-height="false"/>
    </style:style>
    <style:style style:name="C_WL1" style:family="table-cell" style:display-name="C_WL1">
      <style:table-cell-properties fo:background-color="#FFFFFF" style:vertical-align="top" fo:padding-top="0.18cm" fo:padding-bottom="0.18cm" fo:padding-left="0.5cm" fo:padding-right="0.3cm" fo:border-bottom="0.02cm solid #EFEFEF"/>
    </style:style>
    <style:style style:name="C_WLR1" style:family="table-cell" style:display-name="C_WLR1">
      <style:table-cell-properties fo:background-color="#FFFFFF" style:vertical-align="top" fo:padding-top="0.18cm" fo:padding-bottom="0.18cm" fo:padding-left="0.3cm" fo:padding-right="0.5cm" fo:border-bottom="0.02cm solid #EFEFEF"/>
    </style:style>
    <style:style style:name="R_Line1" style:family="table-row" style:display-name="R_Line1">
      <style:table-row-properties style:row-height="1.1cm" style:use-optimal-row-height="false"/>
    </style:style>
    <style:style style:name="C_WL2" style:family="table-cell" style:display-name="C_WL2">
      <style:table-cell-properties fo:background-color="#FFFFFF" style:vertical-align="top" fo:padding-top="0.18cm" fo:padding-bottom="0.18cm" fo:padding-left="0.5cm" fo:padding-right="0.3cm" fo:border-bottom="0.02cm solid #EFEFEF"/>
    </style:style>
    <style:style style:name="C_WLR2" style:family="table-cell" style:display-name="C_WLR2">
      <style:table-cell-properties fo:background-color="#FFFFFF" style:vertical-align="top" fo:padding-top="0.18cm" fo:padding-bottom="0.18cm" fo:padding-left="0.3cm" fo:padding-right="0.5cm" fo:border-bottom="0.02cm solid #EFEFEF"/>
    </style:style>
    <style:style style:name="R_Line2" style:family="table-row" style:display-name="R_Line2">
      <style:table-row-properties style:row-height="1.1cm" style:use-optimal-row-height="false"/>
    </style:style>
    <style:style style:name="C_WL3" style:family="table-cell" style:display-name="C_WL3">
      <style:table-cell-properties fo:background-color="#FFFFFF" style:vertical-align="top" fo:padding-top="0.18cm" fo:padding-bottom="0.18cm" fo:padding-left="0.5cm" fo:padding-right="0.3cm" fo:border-bottom="0.02cm solid #EFEFEF"/>
    </style:style>
    <style:style style:name="C_WLR3" style:family="table-cell" style:display-name="C_WLR3">
      <style:table-cell-properties fo:background-color="#FFFFFF" style:vertical-align="top" fo:padding-top="0.18cm" fo:padding-bottom="0.18cm" fo:padding-left="0.3cm" fo:padding-right="0.5cm" fo:border-bottom="0.02cm solid #EFEFEF"/>
    </style:style>
    <style:style style:name="R_Line3" style:family="table-row" style:display-name="R_Line3">
      <style:table-row-properties style:row-height="1.1cm" style:use-optimal-row-height="false"/>
    </style:style>
    <style:style style:name="R_Tot_Subtot" style:family="table-row" style:display-name="R_Tot_Subtot">
      <style:table-row-properties style:row-height="0.55cm" style:use-optimal-row-height="false"/>
    </style:style>
    <style:style style:name="R_Tot_VAT_20_(1" style:family="table-row" style:display-name="R_Tot_VAT (1">
      <style:table-row-properties style:row-height="0.55cm" style:use-optimal-row-height="false"/>
    </style:style>
    <style:style style:name="R_Tot_Total_20_" style:family="table-row" style:display-name="R_Tot_Total ">
      <style:table-row-properties style:row-height="0.75cm" style:use-optimal-row-height="false"/>
    </style:style>
    <style:style style:name="R_Notes" style:family="table-row" style:display-name="R_Notes">
      <style:table-row-properties style:row-height="2.2cm" style:use-optimal-row-height="false"/>
    </style:style>
    <style:style style:name="R_Footer" style:family="table-row" style:display-name="R_Footer">
      <style:table-row-properties style:row-height="0.7cm" style:use-optimal-row-height="false"/>
    </style:style>
  </office:styles>
  <office:automatic-styles>
    <style:page-layout style:name="A4Layout">
      <style:page-layout-properties fo:page-width="21cm" fo:page-height="29.7cm" fo:margin-left="1.6cm" fo:margin-right="1.6cm" fo:margin-top="0cm" fo:margin-bottom="0cm" style:print-orientation="portrait"/>
    </style:page-layout>
  </office:automatic-styles>
  <office:master-styles>
    <style:master-page style:name="Standard" style:page-layout-name="A4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