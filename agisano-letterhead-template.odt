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automatic-styles/>
  <office:body>
    <office:text>
      <table:table table:name="Header" table:style-name="Tbl_Full">
        <table:table-column table:style-name="Col_LogoL"/>
        <table:table-column table:style-name="Col_LogoR"/>
        <table:table-row table:style-name="RS_Header">
          <table:table-cell table:style-name="CS_Ink">
            <text:p text:style-name="BG_Ink"><text:span text:style-name="SP_Orange">A  </text:span><text:span text:style-name="SP_WordmarkDark">Agisano</text:span></text:p>
            <text:p text:style-name="BG_Ink"><text:span text:style-name="SP_TaglineDark">Building Together</text:span></text:p>
          </table:table-cell>
          <table:table-cell table:style-name="CS_InkR">
            <text:p text:style-name="BG_Ink"><text:span text:style-name="SP_White">hello@agisano.com</text:span></text:p>
            <text:p text:style-name="BG_Ink"><text:span text:style-name="SP_White">agisano.com  ·  Gauteng, South Africa</text:span></text:p>
          </table:table-cell>
        </table:table-row>
      </table:table>
      <table:table table:name="Strip" table:style-name="Tbl_Full">
        <table:table-column table:style-name="Col_Full"/>
        <table:table-row table:style-name="RS_Strip">
          <table:table-cell table:style-name="CS_OrangeStrip">
            <text:p text:style-name="BG_Orange"><text:span text:style-name="SP_OrangeStrip">Registered in South Africa  ·  Gauteng  ·  agisano.com</text:span></text:p>
          </table:table-cell>
        </table:table-row>
      </table:table>
      <table:table table:name="Recipient" table:style-name="Tbl_Full">
        <table:table-column table:style-name="Col_AddrL"/>
        <table:table-column table:style-name="Col_AddrR"/>
        <table:table-row table:style-name="RS_Recipient">
          <table:table-cell table:style-name="CS_Cream">
            <text:p text:style-name="BG_Cream"><text:span text:style-name="SP_Label">TO</text:span></text:p>
            <text:p text:style-name="BG_Cream"><text:span text:style-name="SP_Strong">[Recipient Name / Organisation]</text:span></text:p>
            <text:p text:style-name="BG_Cream"><text:span text:style-name="SP_Muted">[Title / Role]</text:span></text:p>
            <text:p text:style-name="BG_Cream"><text:span text:style-name="SP_Muted">[Address Line 1]</text:span></text:p>
            <text:p text:style-name="BG_Cream"><text:span text:style-name="SP_Muted">[Address Line 2, Province]</text:span></text:p>
          </table:table-cell>
          <table:table-cell table:style-name="CS_CreamR">
            <text:p text:style-name="BG_Cream"><text:span text:style-name="SP_Label">DATE</text:span></text:p>
            <text:p text:style-name="BG_Cream"><text:span text:style-name="SP_Strong">[Date]</text:span></text:p>
            <text:p text:style-name="BG_Cream"/>
            <text:p text:style-name="BG_Cream"><text:span text:style-name="SP_Label">REFERENCE</text:span></text:p>
            <text:p text:style-name="BG_Cream"><text:span text:style-name="SP_Orange">[Ref / Invoice / Doc No.]</text:span></text:p>
          </table:table-cell>
        </table:table-row>
      </table:table>
      <text:p text:style-name="SubjectLine"><text:span text:style-name="SP_Strong">RE: [Subject / Document Title]</text:span></text:p>
      <text:p text:style-name="Salutation">Dear [Name],</text:p>
      <text:p text:style-name="BodyFirst">This letter serves as official correspondence from Agisano (Pty) Ltd. Please replace this paragraph with the body of your letter or document. Use the paragraph styles defined in this template to maintain consistent formatting.</text:p>
      <text:p text:style-name="Body">Agisano is a Gauteng-based ICT services provider working exclusively with public schools. We offer connectivity, technology, managed IT services, and digital presence solutions designed specifically for the realities of South African public education.</text:p>
      <text:p text:style-name="BodyLast">Should you have any questions or require further information, please do not hesitate to contact us at hello@agisano.com or visit agisano.com.</text:p>
      <text:p text:style-name="Closing">Yours sincerely,</text:p>
      <text:p text:style-name="Body"/>
      <text:p text:style-name="Body"/>
      <text:p text:style-name="Body"/>
      <text:p text:style-name="SignName">[Your Full Name]</text:p>
      <text:p text:style-name="SignRole">[Title] <text:s text:c="1"/>· <text:s text:c="1"/>Agisano (Pty) Ltd</text:p>
      <table:table table:name="DocFooter" table:style-name="Tbl_Full">
        <table:table-column table:style-name="Col_AddrL"/>
        <table:table-column table:style-name="Col_AddrR"/>
        <table:table-row table:style-name="RS_Footer">
          <table:table-cell table:style-name="CS_Footer">
            <text:p text:style-name="BG_Footer"><text:span text:style-name="SP_FootTxt">Agisano (Pty) Ltd  ·  Reg: [Company Reg No.]  ·  VAT: [VAT No.]  ·  Gauteng, South Africa</text:span></text:p>
          </table:table-cell>
          <table:table-cell table:style-name="CS_FooterR">
            <text:p text:style-name="BG_Footer"><text:span text:style-name="SP_FootRight">agisano.com  ·  hello@agisano.com</text:span></text:p>
          </table:table-cell>
        </table:table-row>
      </table:table>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styles>
    <style:style style:name="BG_Ink" style:family="paragraph" style:display-name="BG_Ink">
      <style:paragraph-properties fo:text-align="left" fo:background-color="#07090C"/>
      <style:text-properties style:font-name="Inter" fo:font-size="10pt" fo:color="#07090C" fo:background-color="#07090C"/>
    </style:style>
    <style:style style:name="BG_Orange" style:family="paragraph" style:display-name="BG_Orange">
      <style:paragraph-properties fo:text-align="left" fo:background-color="#E85D1B"/>
      <style:text-properties style:font-name="Inter" fo:font-size="10pt" fo:color="#07090C" fo:background-color="#E85D1B"/>
    </style:style>
    <style:style style:name="BG_Cream" style:family="paragraph" style:display-name="BG_Cream">
      <style:paragraph-properties fo:text-align="left" fo:background-color="#F2EDE6"/>
      <style:text-properties style:font-name="Inter" fo:font-size="10pt" fo:color="#07090C" fo:background-color="#F2EDE6"/>
    </style:style>
    <style:style style:name="BG_Cream2" style:family="paragraph" style:display-name="BG_Cream2">
      <style:paragraph-properties fo:text-align="left" fo:background-color="#EDE7DF"/>
      <style:text-properties style:font-name="Inter" fo:font-size="10pt" fo:color="#07090C" fo:background-color="#EDE7DF"/>
    </style:style>
    <style:style style:name="BG_White" style:family="paragraph" style:display-name="BG_White">
      <style:paragraph-properties fo:text-align="left" fo:background-color="#FFFFFF"/>
      <style:text-properties style:font-name="Inter" fo:font-size="10pt" fo:color="#07090C" fo:background-color="#FFFFFF"/>
    </style:style>
    <style:style style:name="BG_Footer" style:family="paragraph" style:display-name="BG_Footer">
      <style:paragraph-properties fo:text-align="left" fo:background-color="#040609"/>
      <style:text-properties style:font-name="Inter" fo:font-size="10pt" fo:color="#07090C" fo:background-color="#040609"/>
    </style:style>
    <style:style style:name="Body" style:family="paragraph" style:display-name="Body">
      <style:paragraph-properties fo:text-align="left" fo:margin-bottom="0.3cm" fo:padding-left="1.8cm" fo:padding-right="1.8cm"/>
      <style:text-properties style:font-name="Inter" fo:font-size="10.5pt" fo:color="#07090C"/>
    </style:style>
    <style:style style:name="BodyFirst" style:family="paragraph" style:display-name="BodyFirst">
      <style:paragraph-properties fo:text-align="left" fo:margin-top="0.5cm" fo:margin-bottom="0.3cm" fo:padding-left="1.8cm" fo:padding-right="1.8cm"/>
      <style:text-properties style:font-name="Inter" fo:font-size="10.5pt" fo:color="#07090C"/>
    </style:style>
    <style:style style:name="BodyLast" style:family="paragraph" style:display-name="BodyLast">
      <style:paragraph-properties fo:text-align="left" fo:margin-bottom="0.6cm" fo:padding-left="1.8cm" fo:padding-right="1.8cm"/>
      <style:text-properties style:font-name="Inter" fo:font-size="10.5pt" fo:color="#07090C"/>
    </style:style>
    <style:style style:name="Heading1" style:family="paragraph" style:display-name="Heading1">
      <style:paragraph-properties fo:text-align="left" fo:margin-top="0.6cm" fo:margin-bottom="0.2cm" fo:padding-left="1.8cm" fo:padding-right="1.8cm"/>
      <style:text-properties style:font-name="Sora" fo:font-size="16pt" fo:color="#07090C" fo:font-weight="bold"/>
    </style:style>
    <style:style style:name="Heading2" style:family="paragraph" style:display-name="Heading2">
      <style:paragraph-properties fo:text-align="left" fo:margin-top="0.5cm" fo:margin-bottom="0.15cm" fo:padding-left="1.8cm" fo:padding-right="1.8cm"/>
      <style:text-properties style:font-name="Sora" fo:font-size="12pt" fo:color="#E85D1B" fo:font-weight="bold"/>
    </style:style>
    <style:style style:name="SubjectLine" style:family="paragraph" style:display-name="SubjectLine">
      <style:paragraph-properties fo:text-align="left" fo:margin-top="0.4cm" fo:margin-bottom="0.4cm" fo:padding-left="1.8cm" fo:padding-right="1.8cm"/>
      <style:text-properties style:font-name="Sora" fo:font-size="13pt" fo:color="#07090C" fo:font-weight="bold"/>
    </style:style>
    <style:style style:name="Salutation" style:family="paragraph" style:display-name="Salutation">
      <style:paragraph-properties fo:text-align="left" fo:margin-top="0.3cm" fo:margin-bottom="0.3cm" fo:padding-left="1.8cm" fo:padding-right="1.8cm"/>
      <style:text-properties style:font-name="Inter" fo:font-size="10.5pt" fo:color="#07090C"/>
    </style:style>
    <style:style style:name="Closing" style:family="paragraph" style:display-name="Closing">
      <style:paragraph-properties fo:text-align="left" fo:margin-top="0.8cm" fo:margin-bottom="0.15cm" fo:padding-left="1.8cm" fo:padding-right="1.8cm"/>
      <style:text-properties style:font-name="Inter" fo:font-size="10.5pt" fo:color="#07090C"/>
    </style:style>
    <style:style style:name="SignName" style:family="paragraph" style:display-name="SignName">
      <style:paragraph-properties fo:text-align="left" fo:margin-bottom="0.05cm" fo:padding-left="1.8cm" fo:padding-right="1.8cm"/>
      <style:text-properties style:font-name="Sora" fo:font-size="11pt" fo:color="#07090C" fo:font-weight="bold"/>
    </style:style>
    <style:style style:name="SignRole" style:family="paragraph" style:display-name="SignRole">
      <style:paragraph-properties fo:text-align="left" fo:padding-left="1.8cm" fo:padding-right="1.8cm"/>
      <style:text-properties style:font-name="Inter" fo:font-size="9pt" fo:color="#888880"/>
    </style:style>
    <style:style style:name="RefLine" style:family="paragraph" style:display-name="RefLine">
      <style:paragraph-properties fo:text-align="left" fo:margin-bottom="0.15cm" fo:padding-left="1.8cm" fo:padding-right="1.8cm"/>
      <style:text-properties style:font-name="Inter" fo:font-size="9pt" fo:color="#888880"/>
    </style:style>
    <style:style style:name="SP_Label" style:family="text" style:display-name="SP_Label">
      <style:text-properties style:font-name="Sora" fo:font-size="7pt" fo:color="#666055" fo:font-weight="bold"/>
    </style:style>
    <style:style style:name="SP_Strong" style:family="text" style:display-name="SP_Strong">
      <style:text-properties style:font-name="Inter" fo:font-size="10.5pt" fo:color="#07090C" fo:font-weight="bold"/>
    </style:style>
    <style:style style:name="SP_Orange" style:family="text" style:display-name="SP_Orange">
      <style:text-properties style:font-name="Sora" fo:font-size="10pt" fo:color="#E85D1B" fo:font-weight="bold"/>
    </style:style>
    <style:style style:name="SP_Muted" style:family="text" style:display-name="SP_Muted">
      <style:text-properties style:font-name="Inter" fo:font-size="9pt" fo:color="#888880"/>
    </style:style>
    <style:style style:name="SP_White" style:family="text" style:display-name="SP_White">
      <style:text-properties style:font-name="Inter" fo:font-size="9pt" fo:color="#F2EDE6"/>
    </style:style>
    <style:style style:name="SP_WhiteSm" style:family="text" style:display-name="SP_WhiteSm">
      <style:text-properties style:font-name="Sora" fo:font-size="7pt" fo:color="#666055" fo:font-weight="bold"/>
    </style:style>
    <style:style style:name="SP_WordmarkDark" style:family="text" style:display-name="SP_WordmarkDark">
      <style:text-properties style:font-name="Sora" fo:font-size="13pt" fo:color="#F2EDE6" fo:font-weight="bold"/>
    </style:style>
    <style:style style:name="SP_TaglineDark" style:family="text" style:display-name="SP_TaglineDark">
      <style:text-properties style:font-name="Inter" fo:font-size="8pt" fo:color="rgba(242,237,230,0.35)" fo:font-style="italic"/>
    </style:style>
    <style:style style:name="SP_FootTxt" style:family="text" style:display-name="SP_FootTxt">
      <style:text-properties style:font-name="Inter" fo:font-size="8pt" fo:color="#555050"/>
    </style:style>
    <style:style style:name="SP_FootRight" style:family="text" style:display-name="SP_FootRight">
      <style:text-properties style:font-name="Sora" fo:font-size="7pt" fo:color="#444040" fo:font-weight="bold"/>
    </style:style>
    <style:style style:name="SP_OrangeStrip" style:family="text" style:display-name="SP_OrangeStrip">
      <style:text-properties style:font-name="Sora" fo:font-size="7.5pt" fo:color="rgba(255,255,255,0.75)" fo:font-weight="bold"/>
    </style:style>
    <style:style style:name="CS_Ink" style:family="table-cell" style:display-name="CS_Ink">
      <style:table-cell-properties fo:background-color="#07090C" style:vertical-align="top" fo:padding-top="0.35cm" fo:padding-bottom="0.35cm" fo:padding-left="0.7cm" fo:padding-right="0.4cm"/>
    </style:style>
    <style:style style:name="CS_InkR" style:family="table-cell" style:display-name="CS_InkR">
      <style:table-cell-properties fo:background-color="#07090C" style:vertical-align="top" fo:padding-top="0.35cm" fo:padding-bottom="0.35cm" fo:padding-left="0.4cm" fo:padding-right="0.7cm"/>
    </style:style>
    <style:style style:name="CS_InkMid" style:family="table-cell" style:display-name="CS_InkMid">
      <style:table-cell-properties fo:background-color="#07090C" style:vertical-align="top" fo:padding-top="0.35cm" fo:padding-bottom="0.35cm" fo:padding-left="0.4cm" fo:padding-right="0.4cm" fo:border-right="0.03cm solid #1e1e1e"/>
    </style:style>
    <style:style style:name="CS_Orange" style:family="table-cell" style:display-name="CS_Orange">
      <style:table-cell-properties fo:background-color="#E85D1B" style:vertical-align="top" fo:padding-top="0.18cm" fo:padding-bottom="0.18cm" fo:padding-left="0.7cm" fo:padding-right="0.7cm"/>
    </style:style>
    <style:style style:name="CS_Cream" style:family="table-cell" style:display-name="CS_Cream">
      <style:table-cell-properties fo:background-color="#F2EDE6" style:vertical-align="top" fo:padding-top="0.28cm" fo:padding-bottom="0.28cm" fo:padding-left="0.7cm" fo:padding-right="0.4cm"/>
    </style:style>
    <style:style style:name="CS_CreamR" style:family="table-cell" style:display-name="CS_CreamR">
      <style:table-cell-properties fo:background-color="#F2EDE6" style:vertical-align="top" fo:padding-top="0.28cm" fo:padding-bottom="0.28cm" fo:padding-left="0.4cm" fo:padding-right="0.7cm"/>
    </style:style>
    <style:style style:name="CS_White" style:family="table-cell" style:display-name="CS_White">
      <style:table-cell-properties fo:background-color="#FFFFFF" style:vertical-align="top" fo:padding-top="0cm" fo:padding-bottom="0cm" fo:padding-left="0cm" fo:padding-right="0cm"/>
    </style:style>
    <style:style style:name="CS_Footer" style:family="table-cell" style:display-name="CS_Footer">
      <style:table-cell-properties fo:background-color="#040609" style:vertical-align="top" fo:padding-top="0.22cm" fo:padding-bottom="0.22cm" fo:padding-left="0.7cm" fo:padding-right="0.4cm"/>
    </style:style>
    <style:style style:name="CS_FooterR" style:family="table-cell" style:display-name="CS_FooterR">
      <style:table-cell-properties fo:background-color="#040609" style:vertical-align="top" fo:padding-top="0.22cm" fo:padding-bottom="0.22cm" fo:padding-left="0.4cm" fo:padding-right="0.7cm"/>
    </style:style>
    <style:style style:name="CS_OrangeStrip" style:family="table-cell" style:display-name="CS_OrangeStrip">
      <style:table-cell-properties fo:background-color="#E85D1B" style:vertical-align="top" fo:padding-top="0.12cm" fo:padding-bottom="0.12cm" fo:padding-left="0.7cm" fo:padding-right="0.7cm"/>
    </style:style>
    <style:style style:name="Col_Full" style:family="table-column" style:display-name="Col_Full">
      <style:table-column-properties style:column-width="21cm"/>
    </style:style>
    <style:style style:name="Col_LogoL" style:family="table-column" style:display-name="Col_LogoL">
      <style:table-column-properties style:column-width="10.5cm"/>
    </style:style>
    <style:style style:name="Col_LogoR" style:family="table-column" style:display-name="Col_LogoR">
      <style:table-column-properties style:column-width="10.5cm"/>
    </style:style>
    <style:style style:name="Col_MetaA" style:family="table-column" style:display-name="Col_MetaA">
      <style:table-column-properties style:column-width="5.5cm"/>
    </style:style>
    <style:style style:name="Col_MetaB" style:family="table-column" style:display-name="Col_MetaB">
      <style:table-column-properties style:column-width="5.5cm"/>
    </style:style>
    <style:style style:name="Col_MetaC" style:family="table-column" style:display-name="Col_MetaC">
      <style:table-column-properties style:column-width="10cm"/>
    </style:style>
    <style:style style:name="Col_AddrL" style:family="table-column" style:display-name="Col_AddrL">
      <style:table-column-properties style:column-width="11cm"/>
    </style:style>
    <style:style style:name="Col_AddrR" style:family="table-column" style:display-name="Col_AddrR">
      <style:table-column-properties style:column-width="10cm"/>
    </style:style>
    <style:style style:name="Tbl_Full" style:family="table" style:display-name="Tbl_Full">
      <style:table-properties style:width="21cm" table:align="left"/>
    </style:style>
    <style:style style:name="RS_Header" style:family="table-row" style:display-name="RS_Header">
      <style:table-row-properties style:row-height="1.5cm" style:use-optimal-row-height="true"/>
    </style:style>
    <style:style style:name="RS_Strip" style:family="table-row" style:display-name="RS_Strip">
      <style:table-row-properties style:row-height="0.42cm" style:use-optimal-row-height="false"/>
    </style:style>
    <style:style style:name="RS_Recipient" style:family="table-row" style:display-name="RS_Recipient">
      <style:table-row-properties style:row-height="2.0cm" style:use-optimal-row-height="true"/>
    </style:style>
    <style:style style:name="RS_Footer" style:family="table-row" style:display-name="RS_Footer">
      <style:table-row-properties style:row-height="0.7cm" style:use-optimal-row-height="false"/>
    </style:style>
  </office:styles>
  <office:automatic-styles>
    <style:page-layout style:name="A4Layout">
      <style:page-layout-properties fo:page-width="21cm" fo:page-height="29.7cm" fo:margin-left="0cm" fo:margin-right="0cm" fo:margin-top="0cm" fo:margin-bottom="0cm" style:print-orientation="portrait"/>
    </style:page-layout>
  </office:automatic-styles>
  <office:master-styles>
    <style:master-page style:name="Standard" style:page-layout-name="A4Layout" style:display-name="Standard"/>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